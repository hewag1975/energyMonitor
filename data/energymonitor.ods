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office:value-type="float" office:value="22218.5" calcext:value-type="float">
            <text:p>22218.5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office:value-type="float" office:value="22268.2" calcext:value-type="float">
            <text:p>22268.2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office:value-type="float" office:value="22299.7" calcext:value-type="float">
            <text:p>22299.7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office:value-type="float" office:value="22320.2" calcext:value-type="float">
            <text:p>22320.2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office:value-type="float" office:value="22354.8" calcext:value-type="float">
            <text:p>22354.8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office:value-type="float" office:value="22397.2" calcext:value-type="float">
            <text:p>22397.2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office:value-type="float" office:value="22459.1" calcext:value-type="float">
            <text:p>22459.1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office:value-type="float" office:value="22505.8" calcext:value-type="float">
            <text:p>22505.8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office:value-type="float" office:value="22550.4" calcext:value-type="float">
            <text:p>22550.4</text:p>
          </table:table-cell>
          <table:table-cell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office:value-type="float" office:value="22604.8" calcext:value-type="float">
            <text:p>22604.8</text:p>
          </table:table-cell>
          <table:table-cell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office:value-type="float" office:value="22657.4" calcext:value-type="float">
            <text:p>22657.4</text:p>
          </table:table-cell>
          <table:table-cell office:value-type="float" office:value="1743" calcext:value-type="float">
            <text:p>174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office:value-type="float" office:value="22705.7" calcext:value-type="float">
            <text:p>22705.7</text:p>
          </table:table-cell>
          <table:table-cell office:value-type="float" office:value="1815" calcext:value-type="float">
            <text:p>18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office:value-type="float" office:value="22742.7" calcext:value-type="float">
            <text:p>22742.7</text:p>
          </table:table-cell>
          <table:table-cell office:value-type="float" office:value="1887" calcext:value-type="float">
            <text:p>18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office:value-type="float" office:value="22793.8" calcext:value-type="float">
            <text:p>22793.8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office:value-type="float" office:value="22810.3" calcext:value-type="float">
            <text:p>22810.3</text:p>
          </table:table-cell>
          <table:table-cell office:value-type="float" office:value="1972" calcext:value-type="float">
            <text:p>197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office:value-type="float" office:value="22834.7" calcext:value-type="float">
            <text:p>22834.7</text:p>
          </table:table-cell>
          <table:table-cell office:value-type="float" office:value="2030" calcext:value-type="float">
            <text:p>20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office:value-type="float" office:value="22857.2" calcext:value-type="float">
            <text:p>22857.2</text:p>
          </table:table-cell>
          <table:table-cell office:value-type="float" office:value="2085" calcext:value-type="float">
            <text:p>208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office:value-type="float" office:value="22887.5" calcext:value-type="float">
            <text:p>22887.5</text:p>
          </table:table-cell>
          <table:table-cell office:value-type="float" office:value="2142" calcext:value-type="float">
            <text:p>214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office:value-type="float" office:value="22907.5" calcext:value-type="float">
            <text:p>22907.5</text:p>
          </table:table-cell>
          <table:table-cell office:value-type="float" office:value="2190" calcext:value-type="float">
            <text:p>219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office:value-type="float" office:value="22936.1" calcext:value-type="float">
            <text:p>22936.1</text:p>
          </table:table-cell>
          <table:table-cell office:value-type="float" office:value="2222" calcext:value-type="float">
            <text:p>222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office:value-type="float" office:value="22960" calcext:value-type="float">
            <text:p>22960</text:p>
          </table:table-cell>
          <table:table-cell office:value-type="float" office:value="2231" calcext:value-type="float">
            <text:p>223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office:value-type="float" office:value="22973.9" calcext:value-type="float">
            <text:p>22973.9</text:p>
          </table:table-cell>
          <table:table-cell office:value-type="float" office:value="2239" calcext:value-type="float">
            <text:p>223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office:value-type="float" office:value="22992.9" calcext:value-type="float">
            <text:p>22992.9</text:p>
          </table:table-cell>
          <table:table-cell office:value-type="float" office:value="2244" calcext:value-type="float">
            <text:p>224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office:value-type="float" office:value="23006.9" calcext:value-type="float">
            <text:p>23006.9</text:p>
          </table:table-cell>
          <table:table-cell office:value-type="float" office:value="2248" calcext:value-type="float">
            <text:p>224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office:value-type="float" office:value="23021.4" calcext:value-type="float">
            <text:p>23021.4</text:p>
          </table:table-cell>
          <table:table-cell office:value-type="float" office:value="2255" calcext:value-type="float">
            <text:p>2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office:value-type="float" office:value="23039.1" calcext:value-type="float">
            <text:p>23039.1</text:p>
          </table:table-cell>
          <table:table-cell office:value-type="float" office:value="2263" calcext:value-type="float">
            <text:p>226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office:value-type="float" office:value="23050.6" calcext:value-type="float">
            <text:p>23050.6</text:p>
          </table:table-cell>
          <table:table-cell office:value-type="float" office:value="2267" calcext:value-type="float">
            <text:p>226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office:value-type="float" office:value="23058" calcext:value-type="float">
            <text:p>23058</text:p>
          </table:table-cell>
          <table:table-cell office:value-type="float" office:value="2271" calcext:value-type="float">
            <text:p>2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office:value-type="float" office:value="23066.8" calcext:value-type="float">
            <text:p>23066.8</text:p>
          </table:table-cell>
          <table:table-cell office:value-type="float" office:value="2275" calcext:value-type="float">
            <text:p>2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office:value-type="float" office:value="23077" calcext:value-type="float">
            <text:p>23077</text:p>
          </table:table-cell>
          <table:table-cell office:value-type="float" office:value="2281" calcext:value-type="float">
            <text:p>22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7-10" calcext:value-type="date">
            <text:p>07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7-17" calcext:value-type="date">
            <text:p>07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7-24" calcext:value-type="date">
            <text:p>07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7-31" calcext:value-type="date">
            <text:p>07/3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8-07" calcext:value-type="date">
            <text:p>08/0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8-14" calcext:value-type="date">
            <text:p>08/1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8-21" calcext:value-type="date">
            <text:p>08/21/2026</text:p>
          </table:table-cell>
          <table:table-cell table:number-columns-repeated="1022"/>
        </table:table-row>
        <table:table-row table:style-name="ro1" table:number-rows-repeated="10483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6-06-14T15:22:02.634400939</dc:date>
    <meta:editing-duration>PT5H16M48S</meta:editing-duration>
    <meta:editing-cycles>124</meta:editing-cycles>
    <meta:generator>LibreOffice/7.3.7.2$Linux_X86_64 LibreOffice_project/30$Build-2</meta:generator>
    <meta:print-date>2025-07-05T20:13:16.113192719</meta:print-date>
    <meta:document-statistic meta:table-count="3" meta:cell-count="1157" meta:object-count="0"/>
  </office:meta>
</office:document-meta>
</file>